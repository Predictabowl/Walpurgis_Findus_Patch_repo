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8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7"/>
          <table:table-cell table:style-name="Default" table:number-columns-repeated="16366"/>
        </table:table-row>
        <table:table-row table:style-name="ro2">
          <table:table-cell/>
          <table:table-cell office:value-type="string" calcext:value-type="string">
            <text:p>Base</text:p>
          </table:table-cell>
          <table:table-cell table:number-columns-repeated="4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5"/>
          <table:table-cell table:style-name="Default" table:number-columns-repeated="16366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table:style-name="Default" table:number-columns-repeated="16366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16366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J5]/[.D5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P5]/[.D5]" office:value-type="percentage" office:value="1.16" calcext:value-type="percentage">
            <text:p>116,00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J6]/[.D6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P6]/[.D6]" office:value-type="percentage" office:value="1.20833333333333" calcext:value-type="percentage">
            <text:p>120,83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J7]/[.D7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P7]/[.D7]" office:value-type="percentage" office:value="1" calcext:value-type="percentage">
            <text:p>100,00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J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P8]/[.D8]" office:value-type="percentage" office:value="1.17241379310345" calcext:value-type="percentage">
            <text:p>117,24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J9]/[.D9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P9]/[.D9]" office:value-type="percentage" office:value="1.17241379310345" calcext:value-type="percentage">
            <text:p>117,24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J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P10]/[.D10]" office:value-type="percentage" office:value="1.17241379310345" calcext:value-type="percentage">
            <text:p>117,24%</text:p>
          </table:table-cell>
          <table:table-cell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 table:number-columns-repeated="5"/>
          <table:table-cell table:style-name="ce2" table:formula="of:=SUMPRODUCT([.H4:.H10];[.I4:.I10])" office:value-type="float" office:value="311.5" calcext:value-type="float">
            <text:p>311,5</text:p>
          </table:table-cell>
          <table:table-cell table:style-name="ce2" table:number-columns-repeated="5"/>
          <table:table-cell table:style-name="ce2" table:formula="of:=SUMPRODUCT([.N4:.N10];[.O4:.O10])" office:value-type="float" office:value="296.5" calcext:value-type="float">
            <text:p>296,5</text:p>
          </table:table-cell>
          <table:table-cell table:style-name="ce2" table:number-columns-repeated="16370"/>
        </table:table-row>
        <table:table-row table:style-name="ro2">
          <table:table-cell table:number-columns-repeated="7"/>
          <table:table-cell table:style-name="ce3" table:formula="of:=[.H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N12]/[.B12]" office:value-type="percentage" office:value="1.20773930753564" calcext:value-type="percentage">
            <text:p>120,77%</text:p>
          </table:table-cell>
          <table:table-cell table:number-columns-repeated="4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3"/>
          <table:table-cell table:formula="of:=[.N12]-[.B12]"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7"/>
          <table:table-cell table:style-name="Default" table:number-columns-repeated="16366"/>
        </table:table-row>
        <table:table-row table:style-name="ro2">
          <table:table-cell/>
          <table:table-cell office:value-type="string" calcext:value-type="string">
            <text:p>Base</text:p>
          </table:table-cell>
          <table:table-cell table:number-columns-repeated="4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5"/>
          <table:table-cell table:style-name="Default" table:number-columns-repeated="16366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16366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J21]/[.D2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" table:formula="of:=[.P21]/[.D21]" office:value-type="percentage" office:value="1.17647058823529" calcext:value-type="percentage">
            <text:p>117,65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J22]/[.D2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3" table:formula="of:=[.P22]/[.D22]" office:value-type="percentage" office:value="1.20588235294118" calcext:value-type="percentage">
            <text:p>120,59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J23]/[.D2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P23]/[.D23]" office:value-type="percentage" office:value="1" calcext:value-type="percentage">
            <text:p>100,00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J24]/[.D2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3" table:formula="of:=[.P24]/[.D24]" office:value-type="percentage" office:value="1.17948717948718" calcext:value-type="percentage">
            <text:p>117,95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H2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J25]/[.D2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style-name="ce3" table:formula="of:=[.P25]/[.D25]" office:value-type="percentage" office:value="1.17948717948718" calcext:value-type="percentage">
            <text:p>117,95%</text:p>
          </table:table-cell>
          <table:table-cell/>
          <table:table-cell table:style-name="Default" table:number-columns-repeated="16366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2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J26]/[.D2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N2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table:formula="of:=[.P26]/[.D26]" office:value-type="percentage" office:value="1.17647058823529" calcext:value-type="percentage">
            <text:p>117,65%</text:p>
          </table:table-cell>
          <table:table-cell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20:.B26];[.C20:.C26])" office:value-type="float" office:value="170.5" calcext:value-type="float">
            <text:p>170,5</text:p>
          </table:table-cell>
          <table:table-cell table:style-name="ce2" table:number-columns-repeated="5"/>
          <table:table-cell table:style-name="ce2" table:formula="of:=SUMPRODUCT([.H20:.H26];[.I20:.I26])" office:value-type="float" office:value="311.5" calcext:value-type="float">
            <text:p>311,5</text:p>
          </table:table-cell>
          <table:table-cell table:style-name="ce2" table:number-columns-repeated="5"/>
          <table:table-cell table:style-name="ce2" table:formula="of:=SUMPRODUCT([.N20:.N26];[.O20:.O26])" office:value-type="float" office:value="205.5" calcext:value-type="float">
            <text:p>205,5</text:p>
          </table:table-cell>
          <table:table-cell table:style-name="ce2" table:number-columns-repeated="2"/>
          <table:table-cell table:number-columns-repeated="2"/>
          <table:table-cell table:style-name="Default" table:number-columns-repeated="16366"/>
        </table:table-row>
        <table:table-row table:style-name="ro2">
          <table:table-cell table:number-columns-repeated="7"/>
          <table:table-cell table:style-name="ce3" table:formula="of:=[.H28]/[.B2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N28]/[.B28]" office:value-type="percentage" office:value="1.20527859237537" calcext:value-type="percentage">
            <text:p>120,53%</text:p>
          </table:table-cell>
          <table:table-cell table:number-columns-repeated="4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3"/>
          <table:table-cell table:formula="of:=[.B28]+[.N15]" office:value-type="float" office:value="221.5" calcext:value-type="float">
            <text:p>221,5</text:p>
          </table:table-cell>
          <table:table-cell table:number-columns-repeated="4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/>
          <table:table-cell table:style-name="Default" table:number-columns-repeated="16366"/>
        </table:table-row>
        <table:table-row table:style-name="ro2" table:number-rows-repeated="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F36:.G3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J36:.K3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N36:.O36])"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66"/>
        </table:table-row>
        <table:table-row table:style-name="ro2">
          <table:table-cell table:number-columns-repeated="11"/>
          <table:table-cell table:formula="of:=[.L36]/[.H36]" office:value-type="float" office:value="1.17931034482759" calcext:value-type="float">
            <text:p>1,17931034482759</text:p>
          </table:table-cell>
          <table:table-cell table:number-columns-repeated="3"/>
          <table:table-cell table:formula="of:=[.P36]/[.H36]" office:value-type="float" office:value="1.31034482758621" calcext:value-type="float">
            <text:p>1,31034482758621</text:p>
          </table:table-cell>
          <table:table-cell table:number-columns-repeated="2"/>
          <table:table-cell table:style-name="Default"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.89625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Hammer" table:style-name="ta1">
        <table:table-column table:style-name="co1" table:number-columns-repeated="13" table:default-cell-style-name="Default"/>
        <table:table-row table:style-name="ro3">
          <table:table-cell table:style-name="ce6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/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F5]/[.F4]" office:value-type="percentage" office:value="0.68421052631579" calcext:value-type="percentage">
            <text:p>68,42%</text:p>
          </table:table-cell>
          <table:table-cell table:style-name="ce3" table:formula="of:=[.G5]/[.G4]" office:value-type="percentage" office:value="0.8" calcext:value-type="percentage">
            <text:p>80,00%</text:p>
          </table:table-cell>
          <table:table-cell/>
          <table:table-cell table:style-name="ce3" table:formula="of:=[.I5]/[.K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Bardiche.A4:Bardiche.J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6:29:53.51193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07T17:43:21.769955100</dc:date>
    <dc:creator>Piero Aldinucci</dc:creator>
    <meta:editing-duration>PT1H40M9S</meta:editing-duration>
    <meta:editing-cycles>12</meta:editing-cycles>
    <meta:generator>LibreOffice/25.8.4.2$Windows_X86_64 LibreOffice_project/290daaa01b999472f0c7a3890eb6a550fd74c6df</meta:generator>
    <meta:document-statistic meta:table-count="3" meta:cell-count="352" meta:object-count="0"/>
  </office:meta>
</office:document-meta>
</file>
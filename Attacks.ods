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2pt" style:font-size-asian="12pt" style:font-size-complex="12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diche" table:style-name="ta1"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Vertic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5]/[.D5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5]/[.D5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6]/[.D6]" office:value-type="percentage" office:value="1.16" calcext:value-type="percentage">
            <text:p>116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" table:formula="of:=[.Q6]/[.D6]" office:value-type="percentage" office:value="1.16" calcext:value-type="percentage">
            <text:p>116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K7]/[.D7]" office:value-type="percentage" office:value="1.20833333333333" calcext:value-type="percentage">
            <text:p>120,83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3" table:formula="of:=[.Q7]/[.D7]" office:value-type="percentage" office:value="1.20833333333333" calcext:value-type="percentage">
            <text:p>120,8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8]/[.D8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" table:formula="of:=[.Q8]/[.D8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9]/[.D9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3" table:formula="of:=[.Q9]/[.D9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10]/[.D10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10]/[.D10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PRODUCT([.B4:.B10];[.C4:.C10])" office:value-type="float" office:value="245.5" calcext:value-type="float">
            <text:p>24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4:.B10];[.E4:.E10])" office:value-type="float" office:value="187.5" calcext:value-type="float">
            <text:p>187,5</text:p>
          </table:table-cell>
          <table:table-cell table:style-name="ce2" table:number-columns-repeated="3"/>
          <table:table-cell table:style-name="ce2" table:formula="of:=SUMPRODUCT([.I4:.I10];[.J4:.J10])" office:value-type="float" office:value="311.5" calcext:value-type="float">
            <text:p>311,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2" table:formula="of:=SUMPRODUCT([.O4:.O10];[.P4:.P10])" office:value-type="float" office:value="296.5" calcext:value-type="float">
            <text:p>296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4:.O10];[.R4:.R10])" office:value-type="float" office:value="237.5" calcext:value-type="float">
            <text:p>237,5</text:p>
          </table:table-cell>
          <table:table-cell/>
          <table:table-cell table:style-name="ce2" table:number-columns-repeated="16364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12]/[.$B21]" office:value-type="float" office:value="7.671875" calcext:value-type="float">
            <text:p>7,67187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E12]/[.B12]" office:value-type="percentage" office:value="0.763747454175153" calcext:value-type="percentage">
            <text:p>76,37%</text:p>
          </table:table-cell>
          <table:table-cell table:style-name="ce2"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12]/[.$B21]" office:value-type="float" office:value="9.734375" calcext:value-type="float">
            <text:p>9,734375</text:p>
          </table:table-cell>
          <table:table-cell table:style-name="ce2"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12]/[.$B21]" office:value-type="float" office:value="9.265625" calcext:value-type="float">
            <text:p>9,26562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R12]/[.O12]" office:value-type="percentage" office:value="0.801011804384486" calcext:value-type="percentage">
            <text:p>80,10%</text:p>
          </table:table-cell>
          <table:table-cell table:style-name="ce2" table:number-columns-repeated="16365"/>
        </table:table-row>
        <table:table-row table:style-name="ro2">
          <table:table-cell table:number-columns-repeated="8"/>
          <table:table-cell table:style-name="ce3" table:formula="of:=[.I12]/[.B12]" office:value-type="percentage" office:value="1.26883910386965" calcext:value-type="percentage">
            <text:p>126,88%</text:p>
          </table:table-cell>
          <table:table-cell table:number-columns-repeated="5"/>
          <table:table-cell table:style-name="ce3" table:formula="of:=[.O12]/[.B12]" office:value-type="percentage" office:value="1.20773930753564" calcext:value-type="percentage">
            <text:p>120,77%</text:p>
          </table:table-cell>
          <table:table-cell table:number-columns-repeated="16368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2"/>
          <table:table-cell table:formula="of:=[.O12]-[.B12]" office:value-type="float" office:value="51" calcext:value-type="float">
            <text:p>5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17:.B20])" office:value-type="float" office:value="32" calcext:value-type="float">
            <text:p>32</text:p>
          </table:table-cell>
          <table:table-cell table:number-columns-repeated="16381"/>
        </table:table-row>
        <table:table-row table:style-name="ro2" table:number-rows-repeated="5">
          <table:table-cell table:number-columns-repeated="16383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office:value-type="string" calcext:value-type="string">
            <text:p>Ao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31]/[.D31]" office:value-type="percentage" office:value="0.852941176470588" calcext:value-type="percentage">
            <text:p>85,29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" table:formula="of:=[.Q31]/[.D31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 table:formula="of:=[.K32]/[.D32]" office:value-type="percentage" office:value="1.05882352941176" calcext:value-type="percentage">
            <text:p>105,88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3" table:formula="of:=[.Q32]/[.D32]" office:value-type="percentage" office:value="1.20588235294118" calcext:value-type="percentage">
            <text:p>120,5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33]/[.D33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" table:formula="of:=[.Q33]/[.D33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34]/[.D34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4]/[.D34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[.I3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35]/[.D35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5]/[.D35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[.B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36]/[.D36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ut Lesser</text:p>
          </table:table-cell>
          <table:table-cell table:formula="of:=[.O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3" table:formula="of:=[.Q36]/[.D36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30:.B36];[.C30:.C36])" office:value-type="float" office:value="170.5" calcext:value-type="float">
            <text:p>170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30:.B36];[.E30:.E36])" office:value-type="float" office:value="136.5" calcext:value-type="float">
            <text:p>136,5</text:p>
          </table:table-cell>
          <table:table-cell table:style-name="ce2" table:number-columns-repeated="3"/>
          <table:table-cell table:style-name="ce2" table:formula="of:=SUMPRODUCT([.I30:.I36];[.J30:.J36])" office:value-type="float" office:value="311.5" calcext:value-type="float">
            <text:p>311,5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table:formula="of:=SUMPRODUCT([.O30:.O36];[.P30:.P36])" office:value-type="float" office:value="205.5" calcext:value-type="float">
            <text:p>20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30:.O36];[.R30:.R36])" office:value-type="float" office:value="161.5" calcext:value-type="float">
            <text:p>161,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38]/[.$B47]" office:value-type="float" office:value="5.16666666666667" calcext:value-type="float">
            <text:p>5,16666666666667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E38]/[.B38]" office:value-type="percentage" office:value="0.80058651026393" calcext:value-type="percentage">
            <text:p>80,06%</text:p>
          </table:table-cell>
          <table:table-cell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38]/[.$B47]" office:value-type="float" office:value="9.43939393939394" calcext:value-type="float">
            <text:p>9,43939393939394</text:p>
          </table:table-cell>
          <table:table-cell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38]/[.$B47]" office:value-type="float" office:value="6.22727272727273" calcext:value-type="float">
            <text:p>6,22727272727273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R38]/[.O38]" office:value-type="percentage" office:value="0.785888077858881" calcext:value-type="percentage">
            <text:p>78,59%</text:p>
          </table:table-cell>
          <table:table-cell table:number-columns-repeated="16365"/>
        </table:table-row>
        <table:table-row table:style-name="ro2">
          <table:table-cell table:number-columns-repeated="8"/>
          <table:table-cell table:style-name="ce3" table:formula="of:=[.I38]/[.B38]" office:value-type="percentage" office:value="1.82697947214076" calcext:value-type="percentage">
            <text:p>182,70%</text:p>
          </table:table-cell>
          <table:table-cell table:number-columns-repeated="5"/>
          <table:table-cell table:style-name="ce3" table:formula="of:=[.O38]/[.B38]" office:value-type="percentage" office:value="1.20527859237537" calcext:value-type="percentage">
            <text:p>120,53%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formula="of:=[.B38]+[.O16]" office:value-type="float" office:value="221.5" calcext:value-type="float">
            <text:p>221,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"/>
          <table:table-cell table:formula="of:=80/68*50" office:value-type="float" office:value="58.8235294117647" calcext:value-type="float">
            <text:p>58,8235294117647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G46:.H46])" office:value-type="float" office:value="72.5" calcext:value-type="float">
            <text:p>72,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formula="of:=AVERAGE([.K46:.L46])" office:value-type="float" office:value="85.5" calcext:value-type="float">
            <text:p>85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O46:.P46])" office:value-type="float" office:value="95" calcext:value-type="float">
            <text:p>95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43:.B46])" office:value-type="float" office:value="33" calcext:value-type="float">
            <text:p>33</text:p>
          </table:table-cell>
          <table:table-cell table:number-columns-repeated="10"/>
          <table:table-cell table:formula="of:=[.M46]/[.I46]" office:value-type="float" office:value="1.17931034482759" calcext:value-type="float">
            <text:p>1,17931034482759</text:p>
          </table:table-cell>
          <table:table-cell table:number-columns-repeated="3"/>
          <table:table-cell table:formula="of:=[.Q46]/[.I46]" office:value-type="float" office:value="1.31034482758621" calcext:value-type="float">
            <text:p>1,31034482758621</text:p>
          </table:table-cell>
          <table:table-cell table:number-columns-repeated="16366"/>
        </table:table-row>
      </table:table>
      <table:table table:name="Axe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3">
          <table:table-cell table:style-name="ce6" office:value-type="string" calcext:value-type="string">
            <text:p>Bas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5:.C5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5:.D7])" office:value-type="float" office:value="72.5" calcext:value-type="float">
            <text:p>7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6:.C6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7:.C7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style-name="ce6" office:value-type="string" calcext:value-type="string">
            <text:p>Upgrad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office:annotation draw:style-name="gr1" svg:width="2.899cm" svg:height="1.799cm" svg:x="11.889cm" svg:y="5.058cm" draw:caption-point-x="-0.61cm" draw:caption-point-y="1.51cm">
              <dc:creator>Piero Aldinucci</dc:creator>
              <dc:date>2026-05-07T16:32:28</dc:date>
              <text:p>It’s a small explosion so can AoE</text:p>
              <text:p/>
            </office:annotation>
            <text:p>Slash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6:.C16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6]+[.E16]" office:value-type="float" office:value="86.5" calcext:value-type="float">
            <text:p>86,5</text:p>
          </table:table-cell>
          <table:table-cell/>
          <table:table-cell table:formula="of:=AVERAGE([.G16:.G18])" office:value-type="float" office:value="86.5" calcext:value-type="float">
            <text:p>86,5</text:p>
          </table:table-cell>
          <table:table-cell/>
          <table:table-cell table:style-name="ce3" table:formula="of:=[.I16]/[.I5]" office:value-type="percentage" office:value="1.19310344827586" calcext:value-type="percentage">
            <text:p>119,31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7:.C17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7]+[.E17]" office:value-type="float" office:value="86.5" calcext:value-type="float">
            <text:p>86,5</text:p>
          </table:table-cell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8:.C18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8]+[.E18]" office:value-type="float" office:value="86.5" calcext:value-type="float">
            <text:p>86,5</text:p>
          </table:table-cell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6" office:value-type="string" calcext:value-type="string">
            <text:p>Mutat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6:.C26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26:.D28])" office:value-type="float" office:value="95" calcext:value-type="float">
            <text:p>95</text:p>
          </table:table-cell>
          <table:table-cell/>
          <table:table-cell table:style-name="ce3" table:formula="of:=[.I26]/[.I5]" office:value-type="percentage" office:value="1.31034482758621" calcext:value-type="percentage">
            <text:p>131,03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7:.C27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8:.C28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</table:table>
      <table:table table:name="Sprays" table:style-name="ta1">
        <table:table-column table:style-name="co1" table:number-columns-repeated="10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Mana total</text:p>
          </table:table-cell>
        </table:table-row>
        <table:table-row table:style-name="ro2">
          <table:table-cell office:value-type="string" calcext:value-type="string">
            <text:p>Hebiko mutation</text:p>
          </table:table-cell>
          <table:table-cell/>
          <table:table-cell table:formula="of:=AVERAGE(4;9)*AVERAGE(1;8)" office:value-type="float" office:value="29.25" calcext:value-type="float">
            <office:annotation draw:style-name="gr1" svg:width="2.899cm" svg:height="1.799cm" svg:x="7.373cm" svg:y="0cm" draw:caption-point-x="-0.61cm" draw:caption-point-y="1.365cm">
              <dc:creator>Piero Aldinucci</dc:creator>
              <dc:date>2026-05-27T01:09:16.07781</dc:date>
              <text:p>SnekAcidSprayz<text:line-break/>RIPPER</text:p>
            </office:annotation>
            <text:p>29,25</text:p>
          </table:table-cell>
          <table:table-cell table:formula="of:=0.5*10*AVERAGE(1;8)" office:value-type="float" office:value="22.5" calcext:value-type="float">
            <office:annotation draw:style-name="gr1" svg:width="2.899cm" svg:height="1.799cm" svg:x="9.631cm" svg:y="0cm" draw:caption-point-x="-0.61cm" draw:caption-point-y="1.365cm">
              <dc:creator>Piero Aldinucci</dc:creator>
              <dc:date>2026-05-27T01:07:08.90261</dc:date>
              <text:p>SnekAcid</text:p>
            </office:annotation>
            <text:p>22,5</text:p>
          </table:table-cell>
          <table:table-cell table:formula="of:=(2+2+6)" office:value-type="float" office:value="10" calcext:value-type="float">
            <text:p>10</text:p>
          </table:table-cell>
          <table:table-cell table:formula="of:=(2+2+6)" office:value-type="float" office:value="10" calcext:value-type="float">
            <text:p>10</text:p>
          </table:table-cell>
          <table:table-cell table:formula="of:=([.C4]+[.D4])*[.E4]" office:value-type="float" office:value="517.5" calcext:value-type="float">
            <text:p>517,5</text:p>
          </table:table-cell>
          <table:table-cell table:formula="of:=[.G4]/[.F4]" office:value-type="float" office:value="51.75" calcext:value-type="float">
            <text:p>51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gor Mutation</text:p>
          </table:table-cell>
          <table:table-cell/>
          <table:table-cell table:formula="of:=AVERAGE(5;12)*AVERAGE(1;8)" office:value-type="float" office:value="38.25" calcext:value-type="float">
            <office:annotation draw:style-name="gr1" svg:width="2.899cm" svg:height="1.799cm" svg:x="7.373cm" svg:y="0.451cm" draw:caption-point-x="-0.61cm" draw:caption-point-y="1.365cm">
              <dc:creator>Piero Aldinucci</dc:creator>
              <dc:date>2026-05-27T01:16:24.88559</dc:date>
              <text:p>PolarRay<text:line-break/>RIPPER</text:p>
            </office:annotation>
            <text:p>38,25</text:p>
          </table:table-cell>
          <table:table-cell office:value-type="float" office:value="0" calcext:value-type="float">
            <text:p>0</text:p>
          </table:table-cell>
          <table:table-cell table:formula="of:=(2+2)+(2+2)" office:value-type="float" office:value="8" calcext:value-type="float">
            <text:p>8</text:p>
          </table:table-cell>
          <table:table-cell table:formula="of:=(2+2+2+2)+(2+2+2+3)" office:value-type="float" office:value="17" calcext:value-type="float">
            <text:p>17</text:p>
          </table:table-cell>
          <table:table-cell table:formula="of:=([.C5]+[.D5])*[.E5]" office:value-type="float" office:value="306" calcext:value-type="float">
            <text:p>306</text:p>
          </table:table-cell>
          <table:table-cell table:formula="of:=[.G5]/[.F5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storm Mutation</text:p>
          </table:table-cell>
          <table:table-cell/>
          <table:table-cell table:formula="of:=AVERAGE(5;9)*[.B13]" office:value-type="float" office:value="35" calcext:value-type="float">
            <office:annotation draw:style-name="gr1" svg:width="2.899cm" svg:height="1.799cm" svg:x="7.373cm" svg:y="0.758cm" draw:caption-point-x="-0.61cm" draw:caption-point-y="1.51cm">
              <dc:creator>Piero Aldinucci</dc:creator>
              <dc:date>2026-05-27T01:36:06.01986</dc:date>
              <text:p>FlameThrMutate<text:line-break/>THRUACTORS</text:p>
              <text:p>Explode every 2 ticks</text:p>
            </office:annotation>
            <text:p>35</text:p>
          </table:table-cell>
          <table:table-cell/>
          <table:table-cell table:formula="of:=3+3+3+3" office:value-type="float" office:value="12" calcext:value-type="float">
            <text:p>12</text:p>
          </table:table-cell>
          <table:table-cell table:formula="of:=1+3+1+3+1+3+1" office:value-type="float" office:value="13" calcext:value-type="float">
            <text:p>13</text:p>
          </table:table-cell>
          <table:table-cell table:formula="of:=([.C6]+[.D6])*[.E6]" office:value-type="float" office:value="420" calcext:value-type="float">
            <text:p>420</text:p>
          </table:table-cell>
          <table:table-cell table:formula="of:=[.G6]/[.F6]" office:value-type="float" office:value="32.3076923076923" calcext:value-type="float">
            <text:p>32,3076923076923</text:p>
          </table:table-cell>
          <table:table-cell table:number-columns-repeated="2"/>
        </table:table-row>
        <table:table-row table:style-name="ro2" table:number-rows-repeated="5">
          <table:table-cell table:number-columns-repeated="10"/>
        </table:table-row>
        <table:table-row table:style-name="ro4">
          <table:table-cell table:style-name="ce8" office:value-type="string" calcext:value-type="string">
            <text:p>FlameThrMutate</text:p>
          </table:table-cell>
          <table:table-cell table:number-columns-repeated="9"/>
        </table:table-row>
        <table:table-row table:style-name="ro2">
          <table:table-cell office:value-type="string" calcext:value-type="string">
            <office:annotation draw:style-name="gr1" svg:width="2.899cm" svg:height="1.799cm" svg:x="2.858cm" svg:y="3.996cm" draw:caption-point-x="-0.61cm" draw:caption-point-y="1.51cm">
              <dc:creator>Piero Aldinucci</dc:creator>
              <dc:date>2026-05-27T01:36:52.0136</dc:date>
              <text:p>Hoe many times will hit a single enemy</text:p>
              <text:p/>
            </office:annotation>
            <text:p>Average Hits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table table:name="Hammer" table:style-name="ta1">
        <table:table-column table:style-name="co1" table:number-columns-repeated="16" table:default-cell-style-name="Default"/>
        <table:table-row table:style-name="ro3">
          <table:table-cell table:style-name="ce6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 office:value-type="string" calcext:value-type="string">
            <text:p>Refire Ticks</text:p>
          </table:table-cell>
          <table:table-cell table:style-name="ce2" office:value-type="string" calcext:value-type="string">
            <text:p>DPS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 office:value-type="string" calcext:value-type="string">
            <text:p>Refire Speed</text:p>
          </table:table-cell>
          <table:table-cell office:value-type="string" calcext:value-type="string">
            <text:p>Total increase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formula="of:=AVERAGE([.B4:.C4])"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table:formula="of:=SUM([.D4:.E4])" office:value-type="float" office:value="177.5" calcext:value-type="float">
            <text:p>17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4]+11" office:value-type="float" office:value="30" calcext:value-type="float">
            <text:p>30</text:p>
          </table:table-cell>
          <table:table-cell table:style-name="ce2" table:formula="of:=[.F4]/[.I4]" office:value-type="float" office:value="5.91666666666667" calcext:value-type="float">
            <text:p>5,91666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graded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197.5" calcext:value-type="float">
            <text:p>197,5</text:p>
          </table:table-cell>
          <table:table-cell office:value-type="float" office:value="0" calcext:value-type="float">
            <text:p>0</text:p>
          </table:table-cell>
          <table:table-cell table:formula="of:=SUM([.D5:.E5])" office:value-type="float" office:value="197.5" calcext:value-type="float">
            <text:p>197,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G5]+11" office:value-type="float" office:value="24" calcext:value-type="float">
            <text:p>24</text:p>
          </table:table-cell>
          <table:table-cell table:style-name="ce2" table:formula="of:=[.F5]/[.I5]" office:value-type="float" office:value="8.22916666666667" calcext:value-type="float">
            <text:p>8,22916666666667</text:p>
          </table:table-cell>
          <table:table-cell/>
          <table:table-cell table:style-name="ce3" table:formula="of:=[.D5]/[.D4]" office:value-type="percentage" office:value="1.11267605633803" calcext:value-type="percentage">
            <text:p>111,27%</text:p>
          </table:table-cell>
          <table:table-cell table:style-name="ce3" table:formula="of:=[.G5]/[.G4]" office:value-type="percentage" office:value="0.68421052631579" calcext:value-type="percentage">
            <text:p>68,42%</text:p>
          </table:table-cell>
          <table:table-cell table:style-name="ce3" table:formula="of:=[.H5]/[.H4]" office:value-type="percentage" office:value="0.8" calcext:value-type="percentage">
            <text:p>80,00%</text:p>
          </table:table-cell>
          <table:table-cell table:style-name="ce3" table:formula="of:=[.I5]/[.I4]" office:value-type="percentage" office:value="0.8" calcext:value-type="percentage">
            <text:p>80,00%</text:p>
          </table:table-cell>
          <table:table-cell table:style-name="ce3" table:formula="of:=[.L5]/[.O5]" office:value-type="percentage" office:value="1.39084507042254" calcext:value-type="percentage">
            <text:p>139,08%</text:p>
          </table:table-cell>
        </table:table-row>
        <table:table-row table:style-name="ro2">
          <table:table-cell office:value-type="string" calcext:value-type="string">
            <text:p>Mutated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AVERAGE([.B6:.C6])" office:value-type="float" office:value="107.5" calcext:value-type="float">
            <text:p>107,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6:.E6])" office:value-type="float" office:value="127.5" calcext:value-type="float">
            <text:p>12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6]+11" office:value-type="float" office:value="30" calcext:value-type="float">
            <text:p>30</text:p>
          </table:table-cell>
          <table:table-cell table:style-name="ce2" table:formula="of:=[.F6]/[.I6]" office:value-type="float" office:value="4.25" calcext:value-type="float">
            <text:p>4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tated modded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AVERAGE([.B7:.C7])" office:value-type="float" office:value="135" calcext:value-type="float">
            <text:p>13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7:.E7])"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7]+11" office:value-type="float" office:value="30" calcext:value-type="float">
            <text:p>30</text:p>
          </table:table-cell>
          <table:table-cell table:style-name="ce2" table:formula="of:=[.F7]/[.I7]" office:value-type="float" office:value="5.16666666666667" calcext:value-type="float">
            <text:p>5,16666666666667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4">
          <table:table-cell table:style-name="ce8" office:value-type="string" calcext:value-type="string">
            <text:p>Mutated Explosio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n. explosions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m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0:.C10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0]*[.D10]"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Bardiche.A4:Bardiche.K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 style:data-style-name="N2" text:time-value="01:04:22.54084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5-27T01:41:50.533059400</dc:date>
    <dc:creator>Piero Aldinucci</dc:creator>
    <meta:editing-duration>PT7H21M56S</meta:editing-duration>
    <meta:editing-cycles>25</meta:editing-cycles>
    <meta:generator>LibreOffice/26.2.3.2$Windows_X86_64 LibreOffice_project/70e089b17412e4cb7773e41413306b17a2328c34</meta:generator>
    <meta:document-statistic meta:table-count="4" meta:cell-count="500" meta:object-count="0"/>
  </office:meta>
</office:document-meta>
</file>
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AVERAGE([.B7:.C7])" office:value-type="float" office:value="135" calcext:value-type="float">
            <text:p>13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5.16666666666667" calcext:value-type="float">
            <text:p>5,16666666666667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7:28:19.61269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22T17:44:35.653915400</dc:date>
    <dc:creator>Piero Aldinucci</dc:creator>
    <meta:editing-duration>PT7H17M19S</meta:editing-duration>
    <meta:editing-cycles>24</meta:editing-cycles>
    <meta:generator>LibreOffice/26.2.3.2$Windows_X86_64 LibreOffice_project/70e089b17412e4cb7773e41413306b17a2328c34</meta:generator>
    <meta:document-statistic meta:table-count="3" meta:cell-count="470" meta:object-count="0"/>
  </office:meta>
</office:document-meta>
</file>
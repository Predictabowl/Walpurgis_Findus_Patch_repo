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formula="of:=AVERAGE([.H3:.I3])" office:value-type="float" office:value="100" calcext:value-type="float">
            <text:p>100</text:p>
          </table:table-cell>
          <table:table-cell/>
          <table:table-cell table:formula="of:=[.I5]*[.K3]" office:value-type="float" office:value="15" calcext:value-type="float">
            <text:p>15</text:p>
          </table:table-cell>
          <table:table-cell/>
          <table:table-cell table:formula="of:=232.5+4*4.5" office:value-type="float" office:value="250.5" calcext:value-type="float">
            <text:p>250,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formula="of:=[.H3]+[.$K$5]" office:value-type="float" office:value="95" calcext:value-type="float">
            <text:p>95</text:p>
          </table:table-cell>
          <table:table-cell table:formula="of:=[.I3]+[.$K$5]"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table:formula="of:=[.I5]+180" office:value-type="float" office:value="280" calcext:value-type="float">
            <text:p>280</text:p>
          </table:table-cell>
          <table:table-cell table:formula="of:=[.K9]*1.15" office:value-type="float" office:value="322" calcext:value-type="float">
            <text:p>322</text:p>
          </table:table-cell>
          <table:table-cell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6"/>
          <table:table-cell table:formula="of:=4*4.5+100" office:value-type="float" office:value="118" calcext:value-type="float">
            <text:p>118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table:formula="of:=300/1.15" office:value-type="float" office:value="260.869565217391" calcext:value-type="float">
            <text:p>260,86956521739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iero Aldinucci</meta:initial-creator>
    <meta:creation-date>2026-06-09T23:32:35.466759700</meta:creation-date>
    <dc:date>2026-06-10T01:07:58.346974400</dc:date>
    <dc:creator>Piero Aldinucci</dc:creator>
    <meta:editing-duration>PT22M42S</meta:editing-duration>
    <meta:editing-cycles>1</meta:editing-cycles>
    <meta:document-statistic meta:table-count="1" meta:cell-count="12" meta:object-count="0"/>
    <meta:generator>LibreOffice/26.2.3.2$Windows_X86_64 LibreOffice_project/70e089b17412e4cb7773e41413306b17a2328c34</meta:generator>
  </office:meta>
</office:document-meta>
</file>